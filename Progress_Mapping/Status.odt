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84in" table:align="left"/>
    </style:style>
    <style:style style:name="Table1.A" style:family="table-column">
      <style:table-column-properties style:column-width="2.5069in"/>
    </style:style>
    <style:style style:name="Table1.B" style:family="table-column">
      <style:table-column-properties style:column-width="0.67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214cf" officeooo:paragraph-rsid="000214cf"/>
    </style:style>
    <style:style style:name="P2" style:family="paragraph" style:parent-style-name="Standard">
      <style:text-properties officeooo:rsid="0002c6fa" officeooo:paragraph-rsid="0002c6fa"/>
    </style:style>
    <style:style style:name="P3" style:family="paragraph" style:parent-style-name="Standard">
      <style:text-properties officeooo:rsid="0002c6fa" officeooo:paragraph-rsid="000310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us Table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age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Channel registry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Video selection rubric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Transcript capture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Recursive indexing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Rubric auto scoring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Metadata enrichment</text:p>
          </table:table-cell>
          <table:table-cell table:style-name="Table1.A1" office:value-type="string">
            <text:p text:style-name="Table_20_Contents">🔜 next</text:p>
          </table:table-cell>
        </table:table-row>
        <table:table-row>
          <table:table-cell table:style-name="Table1.A1" office:value-type="string">
            <text:p text:style-name="Table_20_Contents">Video Registry dataset</text:p>
          </table:table-cell>
          <table:table-cell table:style-name="Table1.A1" office:value-type="string">
            <text:p text:style-name="Table_20_Contents">🔜 next</text:p>
          </table:table-cell>
        </table:table-row>
        <table:table-row>
          <table:table-cell table:style-name="Table1.A1" office:value-type="string">
            <text:p text:style-name="Table_20_Contents">Knowledge Agent feature extraction</text:p>
          </table:table-cell>
          <table:table-cell table:style-name="Table1.A1" office:value-type="string">
            <text:p text:style-name="Table_20_Contents">🔜 next</text:p>
          </table:table-cell>
        </table:table-row>
      </table:table>
      <text:p text:style-name="Standard"/>
      <text:p text:style-name="Standard"/>
      <text:p text:style-name="Standard">Channel Registry (50 channels)<text:line-break/>↓<text:line-break/>Transcript Collection (440 videos)<text:line-break/>↓<text:line-break/>Transcript Dataset (.txt + .meta.json pairs)<text:line-break/>↓<text:line-break/>Video Selection Rubric<text:line-break/>↓<text:line-break/>Scoring + Filtering<text:line-break/>↓<text:line-break/>Video Registry Dataset (307 videos)<text:line-break/>↓<text:line-break/>Traceability fields<text:line-break/>• YouTube_URL<text:line-break/>• Transcript_Path</text:p>
      <text:p text:style-name="Standard"/>
      <text:p text:style-name="P3">European Conference on Machine Learning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2:00:22.609576938</meta:creation-date>
    <dc:date>2026-03-05T17:59:14.041438776</dc:date>
    <meta:editing-duration>PT5H46M5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83" meta:character-count="531" meta:non-whitespace-character-count="469"/>
  </office:meta>
</office:document-meta>
</file>